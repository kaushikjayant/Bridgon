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00000062458C799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039cm"/>
    </style:style>
    <style:style style:name="Table1.B" style:family="table-column">
      <style:table-column-properties style:column-width="3.561cm"/>
    </style:style>
    <style:style style:name="Table1.C" style:family="table-column">
      <style:table-column-properties style:column-width="8.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orphans="1" fo:text-indent="0cm" style:auto-text-indent="false"/>
    </style:style>
    <style:style style:name="P2" style:family="paragraph" style:parent-style-name="Text_20_body" style:list-style-name="L1">
      <style:paragraph-properties fo:margin-top="0cm" fo:margin-bottom="0cm" style:contextual-spacing="false" fo:orphans="1"/>
    </style:style>
    <style:style style:name="P3" style:family="paragraph" style:parent-style-name="Text_20_body" style:list-style-name="L1">
      <style:paragraph-properties fo:orphans="1"/>
    </style:style>
    <style:style style:name="P4" style:family="paragraph" style:parent-style-name="Text_20_body">
      <style:paragraph-properties fo:orphans="1"/>
    </style:style>
    <style:style style:name="P5" style:family="paragraph" style:parent-style-name="Horizontal_20_Line">
      <style:paragraph-properties fo:orphans="1"/>
    </style:style>
    <style:style style:name="P6" style:family="paragraph" style:parent-style-name="Preformatted_20_Text">
      <loext:graphic-properties draw:fill="none" draw:fill-color="#ffffff"/>
      <style:paragraph-properties fo:margin-left="0cm" fo:margin-right="0cm" fo:orphans="1" fo:text-indent="0cm" style:auto-text-indent="false" fo:background-color="transparent"/>
    </style:style>
    <style:style style:name="P7" style:family="paragraph" style:parent-style-name="Preformatted_20_Text">
      <loext:graphic-properties draw:fill="none" draw:fill-color="#ffffff"/>
      <style:paragraph-properties fo:orphans="1" fo:background-color="transparent"/>
    </style:style>
    <style:style style:name="P8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orphans="1" fo:text-indent="0cm" style:auto-text-indent="false" fo:background-color="transparent"/>
    </style:style>
    <style:style style:name="P9" style:family="paragraph" style:parent-style-name="Text_20_body" style:list-style-name="L2">
      <style:paragraph-properties fo:margin-top="0cm" fo:margin-bottom="0cm" style:contextual-spacing="false" fo:orphans="1"/>
    </style:style>
    <style:style style:name="P10" style:family="paragraph" style:parent-style-name="Text_20_body" style:list-style-name="L2">
      <style:paragraph-properties fo:orphans="1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orphans="1" fo:text-indent="0cm" style:auto-text-indent="false"/>
    </style:style>
    <style:style style:name="P12" style:family="paragraph" style:parent-style-name="Text_20_body">
      <style:paragraph-properties fo:margin-left="0cm" fo:margin-right="0cm" fo:line-height="100%" fo:orphans="1" fo:text-indent="0cm" style:auto-text-indent="false"/>
      <style:text-properties fo:font-variant="normal" fo:text-transform="none"/>
    </style:style>
    <style:style style:name="T1" style:family="text">
      <style:text-properties fo:color="#818898" loext:opacity="100%" fo:font-family="'var font-mono'" fo:background-color="transparent" loext:char-shading-value="0"/>
    </style:style>
    <style:style style:name="T2" style:family="text">
      <style:text-properties fo:color="#cc7bf4" loext:opacity="100%" fo:font-family="'var font-mono'" fo:background-color="transparent" loext:char-shading-value="0"/>
    </style:style>
    <style:style style:name="T3" style:family="text">
      <style:text-properties fo:color="#d3d7de" loext:opacity="100%" fo:font-family="'var font-mono'" fo:background-color="transparent" loext:char-shading-value="0"/>
    </style:style>
    <style:style style:name="T4" style:family="text">
      <style:text-properties fo:color="#eaecf0" loext:opacity="100%" fo:font-family="'var font-mono'" fo:background-color="transparent" loext:char-shading-value="0"/>
    </style:style>
    <style:style style:name="T5" style:family="text">
      <style:text-properties fo:color="#9be963" loext:opacity="100%" fo:font-family="'var font-mono'" fo:background-color="transparent" loext:char-shading-value="0"/>
    </style:style>
    <style:style style:name="T6" style:family="text">
      <style:text-properties fo:color="#f47b85" loext:opacity="100%" fo:font-family="'var font-mono'" fo:font-weight="bold" fo:background-color="transparent" loext:char-shading-value="0"/>
    </style:style>
    <style:style style:name="T7" style:family="text">
      <style:text-properties fo:color="#eaecf0" loext:opacity="100%" fo:background-color="transparent" loext:char-shading-value="0"/>
    </style:style>
    <style:style style:name="T8" style:family="text">
      <style:text-properties fo:font-variant="normal" fo:text-transform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Scenarios to cover:</text:span></text:p>
      <text:list text:style-name="L1">
        <text:list-item>
          <text:p text:style-name="P2"><text:span text:style-name="Strong_20_Emphasis">New non-RTL param added to an IP's </text:span><text:span text:style-name="Strong_20_Emphasis"><text:span text:style-name="Source_20_Text">.prm</text:span></text:span> — all existing SoC/SS instances of that IP need values </text:p>
        </text:list-item>
        <text:list-item>
          <text:p text:style-name="P2"><text:span text:style-name="Strong_20_Emphasis">New SoC or SoC·SS starts using an existing IP</text:span> — all non-RTL params for that IP need values for the new context </text:p>
        </text:list-item>
        <text:list-item>
          <text:p text:style-name="P2"><text:span text:style-name="Strong_20_Emphasis">Existing param value changes</text:span> for a specific SoC/SS instance (e.g. revision bump, feature flag flip) </text:p>
        </text:list-item>
        <text:list-item>
          <text:p text:style-name="P2"><text:span text:style-name="Strong_20_Emphasis">IP is removed from a SoC/SS</text:span> — stale entries need pruning </text:p>
        </text:list-item>
        <text:list-item>
          <text:p text:style-name="P2"><text:span text:style-name="Strong_20_Emphasis">New IP added to the ecosystem</text:span> — no non-RTL params exist yet; DB needs bootstrapping </text:p>
        </text:list-item>
        <text:list-item>
          <text:p text:style-name="P2"><text:span text:style-name="Strong_20_Emphasis">Param removed from a </text:span><text:span text:style-name="Strong_20_Emphasis"><text:span text:style-name="Source_20_Text">.prm</text:span></text:span> — DB has orphaned entries </text:p>
        </text:list-item>
        <text:list-item>
          <text:p text:style-name="P3"><text:span text:style-name="Strong_20_Emphasis">Bulk SoC variants</text:span> — a new chip tier (e.g. IMX95 Lite) that's mostly identical to an existing one </text:p>
        </text:list-item>
      </text:list>
      <text:p text:style-name="P4">The core tension: authors own <text:span text:style-name="Source_20_Text">.prm</text:span> files and know the values, but they won't touch the DB directly. So the workflow needs to <text:span text:style-name="Strong_20_Emphasis">pull information from authors through a lightweight, familiar interface</text:span> and <text:span text:style-name="Strong_20_Emphasis">push it into the DB automatically</text:span>.</text:p>
      <text:p text:style-name="P4">Good. Now let me write the response and build the diagram:</text:p>
      <text:p text:style-name="P4">The scenarios you described fall into four distinct trigger types, and the key design insight is: <text:span text:style-name="Strong_20_Emphasis">the </text:span><text:span text:style-name="Strong_20_Emphasis"><text:span text:style-name="Source_20_Text">.prm</text:span></text:span><text:span text:style-name="Strong_20_Emphasis"> file already contains the ground truth of what needs to exist in the DB</text:span> — you can diff it against the DB at any time to know exactly what's missing, stale, or orphaned. That makes the workflow computable, not manual.</text:p>
      <text:p text:style-name="P4">Here's the full proposal:</text:p>
      <text:p text:style-name="P5"/>
      <text:p text:style-name="P4"><text:span text:style-name="Strong_20_Emphasis">Core principle: </text:span><text:span text:style-name="Strong_20_Emphasis"><text:span text:style-name="Source_20_Text">.prm</text:span></text:span><text:span text:style-name="Strong_20_Emphasis">-driven validation as the source of truth</text:span></text:p>
      <text:p text:style-name="P4">The non-RTL DB should never be updated blindly. Every update starts with a <text:span text:style-name="Emphasis">gap analysis</text:span> — compare the <text:span text:style-name="Source_20_Text">.prm</text:span> file(s) for the target IP(s) against what the DB already contains, and generate a structured <text:span text:style-name="Emphasis">contribution request</text:span> that authors fill in. The DB only accepts values through a validated merge, never through direct hand-editing.</text:p>
      <text:p text:style-name="P4"><text:span text:style-name="Strong_20_Emphasis">The four scenarios and their workflows:</text:span></text:p>
      <text:p text:style-name="P4"><text:span text:style-name="Strong_20_Emphasis">Scenario 1 — New non-RTL param added to an IP's </text:span><text:span text:style-name="Strong_20_Emphasis"><text:span text:style-name="Source_20_Text">.prm</text:span></text:span> A CI hook on the <text:span text:style-name="Source_20_Text">.prm</text:span> file detects the new parameter (type <text:span text:style-name="Source_20_Text">non-rtl</text:span>). It runs the gap analyzer, finds all existing SoC/SS instances of that IP in the DB, and generates a YAML contribution file with one empty slot per instance. That file is committed to a <text:span text:style-name="Source_20_Text">db-contributions/</text:span> branch and a pull request is opened — assigned automatically to the IP's author group. Authors fill in values directly in the PR (YAML is readable, diff-friendly). A validation schema checks types, range limits, and enumerated accepted values against the <text:span text:style-name="Source_20_Text">.prm</text:span> definition before merge. On merge, a DB merge script ingests the YAML into the JSON hierarchy.</text:p>
      <text:p text:style-name="P4"><text:span text:style-name="Strong_20_Emphasis">Scenario 2 — New SoC or SoC·SS starts using an existing IP</text:span> When the top spec memory map XLSX gains a new row (detected by CI), the gap analyzer is run for that SoC/SS prefix. It finds all non-RTL params for the referenced IP that don't yet have entries for the new SoC·instance <text:soft-page-break/>combination, and generates a contribution YAML scoped to just those new slots. Same PR workflow — authored by the new SoC's documentation team lead, reviewed by the IP owner.</text:p>
      <text:p text:style-name="P4"><text:span text:style-name="Strong_20_Emphasis">Scenario 3 — Param value change for a specific instance</text:span> Standard PR to the contribution YAML for that SoC/SS. The validation step checks that the new value is within the declared range or accepted value set in the <text:span text:style-name="Source_20_Text">.prm</text:span> before allowing merge.</text:p>
      <text:p text:style-name="P4"><text:span text:style-name="Strong_20_Emphasis">Scenario 4 — IP removed from a SoC/SS</text:span> Memory map XLSX diff detects the removal. CI opens a "cleanup PR" flagging all DB entries for that SoC·IP combination as candidates for deletion. A human approves the cleanup merge — no auto-delete.</text:p>
      <text:p text:style-name="P4"><text:span text:style-name="Strong_20_Emphasis">Scenario 5 — New IP added to ecosystem (bootstrapping)</text:span> No DB entries exist yet. The gap analyzer produces a full contribution template covering all SoC/SS instances that reference this IP in any memory map XLSX across the repo. Bootstrapping contribution assigned to the IP spec author.</text:p>
      <text:p text:style-name="P4"><text:span text:style-name="Strong_20_Emphasis">Scenario 6 — Param removed from </text:span><text:span text:style-name="Strong_20_Emphasis"><text:span text:style-name="Source_20_Text">.prm</text:span></text:span> <text:span text:style-name="Source_20_Text">.prm</text:span> diff shows a <text:span text:style-name="Source_20_Text">non-rtl</text:span> param removed. CI opens an "orphan cleanup" PR flagging DB entries for that param across all instances. Author of the <text:span text:style-name="Source_20_Text">.prm</text:span> change reviews and approves deletion.</text:p>
      <text:p text:style-name="P4"><text:span text:style-name="Strong_20_Emphasis">Scenario 7 — New chip tier (variant of existing SoC)</text:span> Contribution template is pre-populated with values from the parent SoC (e.g. IMX95 → IMX95-Lite). Authors only need to override the entries that differ. A <text:span text:style-name="Source_20_Text">copy-from</text:span> directive in the contribution YAML allows inheriting all values from a named chip prefix with explicit per-instance overrides on top.</text:p>
      <text:p text:style-name="P4"><draw:frame draw:style-name="fr1" draw:name="Image1" text:anchor-type="char" svg:x="0cm" svg:y="0.667cm" svg:width="17cm" svg:height="18.558cm" draw:z-index="0"><draw:image xlink:href="Pictures/10000001000005A00000062458C7991F.png" xlink:type="simple" xlink:show="embed" xlink:actuate="onLoad" draw:mime-type="image/png"/></draw:frame><text:soft-page-break/></text:p>
      <text:p text:style-name="P4"><text:span text:style-name="Strong_20_Emphasis"/></text:p>
      <text:p text:style-name="P4"><text:span text:style-name="Strong_20_Emphasis">The contribution YAML format</text:span> (what authors actually fill in):</text:p>
      <text:p text:style-name="P1">yaml</text:p>
      <text:p text:style-name="P6"><text:span text:style-name="Source_20_Text"><text:span text:style-name="T1"># Auto-generated by gap-analyzer — do not edit structure</text:span></text:span></text:p>
      <text:p text:style-name="P6"><text:span text:style-name="Source_20_Text"><text:span text:style-name="T1"># IP: FlexCAN <text:s/>| <text:s/>triggered-by: FEATURE_FDCAN added to ip.prm</text:span></text:span></text:p>
      <text:p text:style-name="P6"><text:span text:style-name="Source_20_Text"><text:span text:style-name="T1"># Assign: @flexcan-doc-team</text:span></text:span></text:p>
      <text:p text:style-name="P6"><text:span text:style-name="Source_20_Text"><text:span text:style-name="T2">schema_version</text:span></text:span><text:span text:style-name="Source_20_Text"><text:span text:style-name="T3">:</text:span></text:span><text:span text:style-name="Source_20_Text"><text:span text:style-name="T4"> </text:span></text:span><text:span text:style-name="Source_20_Text"><text:span text:style-name="T5">"2.1"</text:span></text:span></text:p>
      <text:p text:style-name="P6"><text:span text:style-name="Source_20_Text"><text:span text:style-name="T2">ip</text:span></text:span><text:span text:style-name="Source_20_Text"><text:span text:style-name="T3">:</text:span></text:span><text:span text:style-name="Source_20_Text"><text:span text:style-name="T4"> FlexCAN</text:span></text:span></text:p>
      <text:p text:style-name="P6"><text:span text:style-name="Source_20_Text"><text:span text:style-name="T2">param</text:span></text:span><text:span text:style-name="Source_20_Text"><text:span text:style-name="T3">:</text:span></text:span><text:span text:style-name="Source_20_Text"><text:span text:style-name="T4"> FEATURE_FDCAN</text:span></text:span></text:p>
      <text:p text:style-name="P6"><text:span text:style-name="Source_20_Text"><text:span text:style-name="T2">type</text:span></text:span><text:span text:style-name="Source_20_Text"><text:span text:style-name="T3">:</text:span></text:span><text:span text:style-name="Source_20_Text"><text:span text:style-name="T4"> boolean <text:s text:c="9"/></text:span></text:span><text:span text:style-name="Source_20_Text"><text:span text:style-name="T1"># from .prm — validates your entries</text:span></text:span></text:p>
      <text:p text:style-name="P6"><text:span text:style-name="Source_20_Text"><text:span text:style-name="T2">accepted-values</text:span></text:span><text:span text:style-name="Source_20_Text"><text:span text:style-name="T3">:</text:span></text:span><text:span text:style-name="Source_20_Text"><text:span text:style-name="T4"> </text:span></text:span><text:span text:style-name="Source_20_Text"><text:span text:style-name="T3">[</text:span></text:span><text:span text:style-name="Source_20_Text"><text:span text:style-name="T6">true</text:span></text:span><text:span text:style-name="Source_20_Text"><text:span text:style-name="T3">,</text:span></text:span><text:span text:style-name="Source_20_Text"><text:span text:style-name="T4"> </text:span></text:span><text:span text:style-name="Source_20_Text"><text:span text:style-name="T6">false</text:span></text:span><text:span text:style-name="Source_20_Text"><text:span text:style-name="T3">]</text:span></text:span></text:p>
      <text:p text:style-name="P7"><text:soft-page-break/></text:p>
      <text:p text:style-name="P6"><text:span text:style-name="Source_20_Text"><text:span text:style-name="T2">instances</text:span></text:span><text:span text:style-name="Source_20_Text"><text:span text:style-name="T3">:</text:span></text:span></text:p>
      <text:p text:style-name="P6"><text:span text:style-name="Source_20_Text"><text:span text:style-name="T7"><text:s text:c="2"/></text:span></text:span><text:span text:style-name="Source_20_Text"><text:span text:style-name="T2">IMX95</text:span></text:span><text:span text:style-name="Source_20_Text"><text:span text:style-name="T3">:</text:span></text:span></text:p>
      <text:p text:style-name="P6"><text:span text:style-name="Source_20_Text"><text:span text:style-name="T7"><text:s text:c="4"/></text:span></text:span><text:span text:style-name="Source_20_Text"><text:span text:style-name="T2">FLEXCAN_0</text:span></text:span><text:span text:style-name="Source_20_Text"><text:span text:style-name="T3">:</text:span></text:span><text:span text:style-name="Source_20_Text"><text:span text:style-name="T4"> __FILL__</text:span></text:span></text:p>
      <text:p text:style-name="P6"><text:span text:style-name="Source_20_Text"><text:span text:style-name="T7"><text:s text:c="4"/></text:span></text:span><text:span text:style-name="Source_20_Text"><text:span text:style-name="T2">FLEXCAN_1</text:span></text:span><text:span text:style-name="Source_20_Text"><text:span text:style-name="T3">:</text:span></text:span><text:span text:style-name="Source_20_Text"><text:span text:style-name="T4"> __FILL__</text:span></text:span></text:p>
      <text:p text:style-name="P6"><text:span text:style-name="Source_20_Text"><text:span text:style-name="T7"><text:s text:c="2"/></text:span></text:span><text:span text:style-name="Source_20_Text"><text:span text:style-name="T2">IMX93</text:span></text:span><text:span text:style-name="Source_20_Text"><text:span text:style-name="T3">:</text:span></text:span></text:p>
      <text:p text:style-name="P6"><text:span text:style-name="Source_20_Text"><text:span text:style-name="T7"><text:s text:c="4"/></text:span></text:span><text:span text:style-name="Source_20_Text"><text:span text:style-name="T2">FLEXCAN_0</text:span></text:span><text:span text:style-name="Source_20_Text"><text:span text:style-name="T3">:</text:span></text:span><text:span text:style-name="Source_20_Text"><text:span text:style-name="T4"> __FILL__</text:span></text:span></text:p>
      <text:p text:style-name="P6"><text:span text:style-name="Source_20_Text"><text:span text:style-name="T7"><text:s text:c="4"/></text:span></text:span><text:span text:style-name="Source_20_Text"><text:span text:style-name="T2">FLEXCAN_1</text:span></text:span><text:span text:style-name="Source_20_Text"><text:span text:style-name="T3">:</text:span></text:span><text:span text:style-name="Source_20_Text"><text:span text:style-name="T4"> __FILL__</text:span></text:span></text:p>
      <text:p text:style-name="P7"/>
      <text:p text:style-name="P6"><text:span text:style-name="Source_20_Text"><text:span text:style-name="T1"># Chip variant shortcut — uncomment to inherit and override</text:span></text:span></text:p>
      <text:p text:style-name="P6"><text:span text:style-name="Source_20_Text"><text:span text:style-name="T1"># copy-from: IMX95</text:span></text:span></text:p>
      <text:p text:style-name="P6"><text:span text:style-name="Source_20_Text"><text:span text:style-name="T1"># overrides:</text:span></text:span></text:p>
      <text:p text:style-name="P8"><text:span text:style-name="Source_20_Text"><text:span text:style-name="T1"># <text:s text:c="2"/>FLEXCAN_0: false</text:span></text:span></text:p>
      <text:p text:style-name="P4"><text:span text:style-name="Strong_20_Emphasis">Tooling you'd need to build</text:span> (all small Python scripts)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ool</text:p>
            </table:table-cell>
            <table:table-cell table:style-name="Table1.A1" office:value-type="string">
              <text:p text:style-name="Table_20_Heading">Trigger</text:p>
            </table:table-cell>
            <table:table-cell table:style-name="Table1.A1" office:value-type="string">
              <text:p text:style-name="Table_20_Heading">What it do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gap-analyzer.py</text:span></text:p>
          </table:table-cell>
          <table:table-cell table:style-name="Table1.A1" office:value-type="string">
            <text:p text:style-name="Table_20_Contents">CI on <text:span text:style-name="Source_20_Text">.prm</text:span> or XLSX commit</text:p>
          </table:table-cell>
          <table:table-cell table:style-name="Table1.A1" office:value-type="string">
            <text:p text:style-name="Table_20_Contents">Diffs <text:span text:style-name="Source_20_Text">.prm</text:span> non-rtl params vs DB; diffs XLSX rows vs DB instances; outputs structured gap report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ntribution-gen.py</text:span></text:p>
          </table:table-cell>
          <table:table-cell table:style-name="Table1.A1" office:value-type="string">
            <text:p text:style-name="Table_20_Contents">Output of gap-analyzer</text:p>
          </table:table-cell>
          <table:table-cell table:style-name="Table1.A1" office:value-type="string">
            <text:p text:style-name="Table_20_Contents">Generates pre-filled YAML contribution files with <text:span text:style-name="Source_20_Text">__FILL__</text:span> slots; opens draft PR</text:p>
          </table:table-cell>
        </table:table-row>
        <table:table-row>
          <table:table-cell table:style-name="Table1.A1" office:value-type="string">
            <text:p text:style-name="Table_20_Contents"><text:span text:style-name="Source_20_Text">schema-validator.py</text:span></text:p>
          </table:table-cell>
          <table:table-cell table:style-name="Table1.A1" office:value-type="string">
            <text:p text:style-name="Table_20_Contents">PR CI check</text:p>
          </table:table-cell>
          <table:table-cell table:style-name="Table1.A1" office:value-type="string">
            <text:p text:style-name="Table_20_Contents">Validates YAML values against <text:span text:style-name="Source_20_Text">.prm</text:span> type/range/enum before merge is permitted</text:p>
          </table:table-cell>
        </table:table-row>
        <table:table-row>
          <table:table-cell table:style-name="Table1.A1" office:value-type="string">
            <text:p text:style-name="Table_20_Contents"><text:span text:style-name="Source_20_Text">db-merge.py</text:span></text:p>
          </table:table-cell>
          <table:table-cell table:style-name="Table1.A1" office:value-type="string">
            <text:p text:style-name="Table_20_Contents">On PR merge</text:p>
          </table:table-cell>
          <table:table-cell table:style-name="Table1.A1" office:value-type="string">
            <text:p text:style-name="Table_20_Contents">Ingests validated YAML into the JSON DB hierarchy; handles <text:span text:style-name="Source_20_Text">copy-from</text:span> inheritance</text:p>
          </table:table-cell>
        </table:table-row>
        <table:table-row>
          <table:table-cell table:style-name="Table1.A1" office:value-type="string">
            <text:p text:style-name="Table_20_Contents"><text:span text:style-name="Source_20_Text">orphan-report.py</text:span></text:p>
          </table:table-cell>
          <table:table-cell table:style-name="Table1.A1" office:value-type="string">
            <text:p text:style-name="Table_20_Contents">On param/IP removal</text:p>
          </table:table-cell>
          <table:table-cell table:style-name="Table1.A1" office:value-type="string">
            <text:p text:style-name="Table_20_Contents">Generates cleanup PR flagging stale DB entries for human approval</text:p>
          </table:table-cell>
        </table:table-row>
      </table:table>
      <text:p text:style-name="P4"><text:span text:style-name="Strong_20_Emphasis">Key guardrails:</text:span></text:p>
      <text:list text:style-name="L2">
        <text:list-item>
          <text:p text:style-name="P9">The DB JSON is never edited directly — only through the merge tool </text:p>
        </text:list-item>
        <text:list-item>
          <text:p text:style-name="P9"><text:span text:style-name="Source_20_Text">__FILL__</text:span> slots that remain unfilled block the PR merge (schema validator rejects them) </text:p>
        </text:list-item>
        <text:list-item>
          <text:p text:style-name="P9">The <text:span text:style-name="Source_20_Text">copy-from</text:span> directive is the escape hatch for chip variants — authors declare inheritance explicitly and only override what differs, rather than re-entering everything </text:p>
        </text:list-item>
        <text:list-item>
          <text:p text:style-name="P10">Cleanup (orphan removal) always requires human approval — never auto-deleted </text:p>
        </text:list-item>
      </text:list>
      <text:p text:style-name="P11"><text:span text:style-name="T8"></text:span></text:p>
      <text:p text:style-name="P12"></text:p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7T17:23:48.501160112</meta:creation-date>
    <dc:date>2026-06-07T17:31:33.651806866</dc:date>
    <meta:editing-duration>PT7M45S</meta:editing-duration>
    <meta:editing-cycles>1</meta:editing-cycles>
    <meta:document-statistic meta:table-count="1" meta:image-count="1" meta:object-count="0" meta:page-count="4" meta:paragraph-count="69" meta:word-count="939" meta:character-count="5813" meta:non-whitespace-character-count="4889"/>
    <meta:generator>LibreOffice/25.8.7.3$Linux_X86_64 LibreOffice_project/580$Build-3</meta:generator>
  </office:meta>
</office:document-meta>
</file>